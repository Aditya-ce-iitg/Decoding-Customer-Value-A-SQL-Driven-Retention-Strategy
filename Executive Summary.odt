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Normal" style:list-style-name="LFO3" style:family="paragraph"/>
    <style:style style:name="T28" style:parent-style-name="DefaultParagraphFont" style:family="text">
      <style:text-properties fo:font-style="italic" style:font-style-asian="italic" style:font-style-complex="italic"/>
    </style:style>
    <style:style style:name="P29" style:parent-style-name="Normal" style:list-style-name="LFO3" style:family="paragraph"/>
    <style:style style:name="T30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Executive</text:span><text:span text:style-name="T3"><text:s/>Summary</text:span></text:p>
      <text:p text:style-name="Normal"><text:span text:style-name="T4">Is the business successfully building a loyal customer base, or is it reliant on continuous promotional activity?</text:span><text:s/>The business is successfully building organic loyalty at the top, but remains dangerously reliant on margin-removing<text:s/>promotions at the bottom. We have cultivated a "High Value" segment that buys entirely on brand merit with 0% promotional dependency. However, the remaining 66% of customers are either completely addicted to discounts or utilizing them without building any long-term loyalty. The brand must urgently protect the margins of its organically loyal buyers, test habit-building triggers on the underperforming middle tier, and actively wean the bottom tier off their heavy promotional dependency.<text:s/></text:p>
      <text:p text:style-name="P5">The Tactical Playbook</text:p>
      <text:p text:style-name="Normal"><text:span text:style-name="T6">Overall Metrics:</text:span><text:s/>3,900 Customers | $233,081 Total Revenue | 3.75/5 Avg Rating</text:p>
      <text:p text:style-name="Normal"><text:span text:style-name="T7">1. High Value Tier: The Organic Loyalists</text:span></text:p>
      <text:list text:style-name="LFO1" text:continue-numbering="true">
        <text:list-item>
          <text:p text:style-name="P8"><text:span text:style-name="T9">The Data:</text:span><text:s/>0% promo dependency, highest retention (67.5%), and highest spend ($67.76/order).<text:s/></text:p>
        </text:list-item>
        <text:list-item>
          <text:p text:style-name="P10"><text:span text:style-name="T11">The Strategy:</text:span><text:s/><text:span text:style-name="T12">Protect &amp; Scale.</text:span><text:s/>Never offer unprompted discounts to this group. Shift marketing to a year-round focus on hero categories (Clothing &amp; Accessories). Direct paid acquisition to lookalike audiences (women 35-55, no coupon-seeking behavior).<text:s/></text:p>
        </text:list-item>
      </text:list>
      <text:p text:style-name="Normal"><text:span text:style-name="T13">2. Mid Value Tier: The Underperformers</text:span></text:p>
      <text:list text:style-name="LFO2" text:continue-numbering="true">
        <text:list-item>
          <text:p text:style-name="P14"><text:span text:style-name="T15">The Data:</text:span><text:s/>29% promo usage, but the lowest retention rate (34.3%) and lowest spend ($51.69/order).<text:s/></text:p>
        </text:list-item>
        <text:list-item>
          <text:p text:style-name="P16"><text:span text:style-name="T17">The Strategy:</text:span><text:s/><text:span text:style-name="T18">Test &amp; Transition.</text:span><text:s/>Stop sitewide discounts. Implement category-specific triggers (e.g., a Footwear promo only if they previously bought Footwear) to force habit-building. If repurchase rates fail to improve within 90 days, halt promotions and redirect the budget.<text:s/></text:p>
        </text:list-item>
      </text:list>
      <text:p text:style-name="Normal"><text:span text:style-name="T19">3. Low Value Tier: The Promo-Addicts</text:span></text:p>
      <text:list text:style-name="LFO3" text:continue-numbering="true">
        <text:list-item>
          <text:p text:style-name="P20"><text:span text:style-name="T21">The Data:</text:span><text:s/>100% promo code usage and a 53.2% dependency rate.<text:s/></text:p>
        </text:list-item>
        <text:list-item>
          <text:p text:style-name="P22"><text:span text:style-name="T23">The Strategy:</text:span><text:s/><text:span text:style-name="T24">The 6-Month Plan.</text:span></text:p>
          <text:list text:continue-numbering="true">
            <text:list-item>
              <text:p text:style-name="P25"><text:span text:style-name="T26">Months 1-2:</text:span><text:s/>Reduce current discounts to a flat 10% and revoke free shipping.<text:s/></text:p>
            </text:list-item>
            <text:list-item>
              <text:p text:style-name="P27"><text:span text:style-name="T28">Months 3-4:</text:span><text:s/>Pivot to value-based offers (e.g., "Buy 2, Get 10% Off") to test price sensitivity.<text:s/></text:p>
            </text:list-item>
            <text:list-item>
              <text:p text:style-name="P29"><text:span text:style-name="T30">Months 5-6:</text:span><text:s/>Completely remove all promotional offers and replace them with exclusive loyalty perks.<text:s/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itya Jaiswal</meta:initial-creator>
    <dc:creator>Aditya Jaiswal</dc:creator>
    <meta:creation-date>2026-06-16T20:28:00Z</meta:creation-date>
    <dc:date>2026-06-16T20:37:00Z</dc:date>
    <meta:template xlink:href="Normal" xlink:type="simple"/>
    <meta:editing-cycles>1</meta:editing-cycles>
    <meta:editing-duration>PT540S</meta:editing-duration>
    <meta:document-statistic meta:page-count="2" meta:paragraph-count="4" meta:word-count="306" meta:character-count="2051" meta:row-count="14" meta:non-whitespace-character-count="1749"/>
  </office:meta>
</office:document-meta>
</file>